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F00000406B5B0061F.png" manifest:media-type="image/png"/>
  <manifest:file-entry manifest:full-path="Pictures/100000010000077F0000040610002C26.png" manifest:media-type="image/png"/>
  <manifest:file-entry manifest:full-path="Pictures/100000010000077F00000408A250214C.png" manifest:media-type="image/png"/>
  <manifest:file-entry manifest:full-path="Pictures/100000010000077F00000407D2A215E1.png" manifest:media-type="image/png"/>
  <manifest:file-entry manifest:full-path="Pictures/100000010000077F00000409D5DC0132.png" manifest:media-type="image/png"/>
  <manifest:file-entry manifest:full-path="Pictures/100000010000077F00000408D05103D0.png" manifest:media-type="image/png"/>
  <manifest:file-entry manifest:full-path="Pictures/100000010000077F000004046DA041A4.png" manifest:media-type="image/png"/>
  <manifest:file-entry manifest:full-path="Pictures/100000010000077D00000407325DA9FD.png" manifest:media-type="image/png"/>
  <manifest:file-entry manifest:full-path="Pictures/100000010000077F000004084802E5C2.png" manifest:media-type="image/png"/>
  <manifest:file-entry manifest:full-path="Pictures/100000010000077F0000040A1C443F00.png" manifest:media-type="image/png"/>
  <manifest:file-entry manifest:full-path="Pictures/100000010000077F000004085CEFE0B3.png" manifest:media-type="image/png"/>
  <manifest:file-entry manifest:full-path="Pictures/100000010000077F000004041FBFD73F.png" manifest:media-type="image/png"/>
  <manifest:file-entry manifest:full-path="Pictures/100000010000077E0000040A46173F64.png" manifest:media-type="image/png"/>
  <manifest:file-entry manifest:full-path="Pictures/100000010000077F00000407FC587649.png" manifest:media-type="image/png"/>
  <manifest:file-entry manifest:full-path="Pictures/100000010000077F00000408958D8EA7.png" manifest:media-type="image/png"/>
  <manifest:file-entry manifest:full-path="Pictures/100000010000077F0000040842B21CBE.png" manifest:media-type="image/png"/>
  <manifest:file-entry manifest:full-path="Pictures/100000010000077F000004095AB60CE1.png" manifest:media-type="image/png"/>
  <manifest:file-entry manifest:full-path="Pictures/100000010000077F00000409E20EB1D1.png" manifest:media-type="image/png"/>
  <manifest:file-entry manifest:full-path="Pictures/100000010000077F00000406AF8E9880.png" manifest:media-type="image/png"/>
  <manifest:file-entry manifest:full-path="Pictures/100000010000077F000004095876379E.png" manifest:media-type="image/png"/>
  <manifest:file-entry manifest:full-path="Pictures/100000010000077F00000407F9292928.png" manifest:media-type="image/png"/>
  <manifest:file-entry manifest:full-path="Pictures/100000010000077D00000408D0ED4B68.png" manifest:media-type="image/png"/>
  <manifest:file-entry manifest:full-path="Pictures/100000010000077F00000406CFEEFDA8.png" manifest:media-type="image/png"/>
  <manifest:file-entry manifest:full-path="Pictures/100000010000077F0000040584D5A665.png" manifest:media-type="image/png"/>
  <manifest:file-entry manifest:full-path="Pictures/100000010000077F000004069A98B7DD.png" manifest:media-type="image/png"/>
  <manifest:file-entry manifest:full-path="Pictures/100000010000077F00000408CFD6E909.png" manifest:media-type="image/png"/>
  <manifest:file-entry manifest:full-path="Pictures/100000010000077F00000409135A3702.png" manifest:media-type="image/png"/>
  <manifest:file-entry manifest:full-path="Pictures/100000010000077F000004094B512BF3.png" manifest:media-type="image/png"/>
  <manifest:file-entry manifest:full-path="Pictures/100000010000077F000004060F08F170.png" manifest:media-type="image/png"/>
  <manifest:file-entry manifest:full-path="Pictures/100000010000077F000004099F1C96C3.png" manifest:media-type="image/png"/>
  <manifest:file-entry manifest:full-path="Pictures/100000010000077F0000040C81AB3430.png" manifest:media-type="image/png"/>
  <manifest:file-entry manifest:full-path="Pictures/100000010000077F000004064229ADF2.png" manifest:media-type="image/png"/>
  <manifest:file-entry manifest:full-path="Pictures/100000010000077E00000406AD972937.png" manifest:media-type="image/png"/>
  <manifest:file-entry manifest:full-path="Pictures/100000010000077D00000406E942829D.png" manifest:media-type="image/png"/>
  <manifest:file-entry manifest:full-path="Pictures/10000001000007790000040204CE3EEA.png" manifest:media-type="image/png"/>
  <manifest:file-entry manifest:full-path="Pictures/100000010000077600000407CA3541C8.png" manifest:media-type="image/png"/>
  <manifest:file-entry manifest:full-path="Pictures/100000010000077F00000407A9174DBE.png" manifest:media-type="image/png"/>
  <manifest:file-entry manifest:full-path="Pictures/100000010000077F00000407EEA376C5.png" manifest:media-type="image/png"/>
  <manifest:file-entry manifest:full-path="Pictures/100000010000077F00000407F22D12F3.png" manifest:media-type="image/png"/>
  <manifest:file-entry manifest:full-path="Pictures/100000010000077F0000040888083972.png" manifest:media-type="image/png"/>
  <manifest:file-entry manifest:full-path="Pictures/100000010000077F0000040943E61270.png" manifest:media-type="image/png"/>
  <manifest:file-entry manifest:full-path="Pictures/100000010000077F0000040891C7D3D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text-properties officeooo:paragraph-rsid="0008542a"/>
    </style:style>
    <style:style style:name="P2" style:family="paragraph" style:parent-style-name="Heading_20_1">
      <style:paragraph-properties fo:margin-left="0cm" fo:margin-right="0cm" fo:text-indent="0cm" style:auto-text-indent="false"/>
      <style:text-properties officeooo:paragraph-rsid="0008542a"/>
    </style:style>
    <style:style style:name="P3" style:family="paragraph" style:parent-style-name="Heading_20_3">
      <style:paragraph-properties fo:margin-top="0cm" fo:margin-bottom="0.247cm" style:contextual-spacing="false" fo:line-height="115%"/>
      <style:text-properties officeooo:rsid="0030fd94"/>
    </style:style>
    <style:style style:name="P4" style:family="paragraph" style:parent-style-name="Text_20_body">
      <style:paragraph-properties fo:margin-left="0cm" fo:margin-right="0cm" fo:text-indent="0cm" style:auto-text-indent="false"/>
      <style:text-properties officeooo:rsid="0030fd94"/>
    </style:style>
    <style:style style:name="P5" style:family="paragraph" style:parent-style-name="Text_20_body" style:list-style-name="L1">
      <style:paragraph-properties fo:margin-left="0cm" fo:margin-right="0cm" fo:text-indent="0cm" style:auto-text-indent="false"/>
      <style:text-properties officeooo:rsid="0030fd94"/>
    </style:style>
    <style:style style:name="P6" style:family="paragraph" style:parent-style-name="Text_20_body" style:list-style-name="L2">
      <style:paragraph-properties fo:margin-left="0cm" fo:margin-right="0cm" fo:text-indent="0cm" style:auto-text-indent="false"/>
      <style:text-properties officeooo:rsid="0030fd94"/>
    </style:style>
    <style:style style:name="P7" style:family="paragraph" style:parent-style-name="Text_20_body" style:list-style-name="L3">
      <style:paragraph-properties fo:margin-left="0cm" fo:margin-right="0cm" fo:text-indent="0cm" style:auto-text-indent="false"/>
      <style:text-properties officeooo:rsid="0030fd94"/>
    </style:style>
    <style:style style:name="P8" style:family="paragraph" style:parent-style-name="Text_20_body" style:list-style-name="L4">
      <style:paragraph-properties fo:margin-left="0cm" fo:margin-right="0cm" fo:text-indent="0cm" style:auto-text-indent="false"/>
      <style:text-properties officeooo:rsid="0030fd94"/>
    </style:style>
    <style:style style:name="P9" style:family="paragraph" style:parent-style-name="Text_20_body">
      <style:paragraph-properties fo:margin-top="0cm" fo:margin-bottom="0.247cm" style:contextual-spacing="false" fo:line-height="115%"/>
      <style:text-properties officeooo:rsid="0030fd94"/>
    </style:style>
    <style:style style:name="P10" style:family="paragraph" style:parent-style-name="Text_20_body">
      <style:text-properties officeooo:rsid="0030fd94"/>
    </style:style>
    <style:style style:name="P11" style:family="paragraph" style:parent-style-name="Preformatted_20_Text">
      <style:paragraph-properties fo:margin-left="0cm" fo:margin-right="0cm" fo:margin-top="0cm" fo:margin-bottom="0.247cm" style:contextual-spacing="false" fo:line-height="115%" fo:text-indent="0cm" style:auto-text-indent="false"/>
      <style:text-properties style:font-name="Liberation Serif" officeooo:rsid="0030fd94"/>
    </style:style>
    <style:style style:name="P12" style:family="paragraph" style:parent-style-name="Preformatted_20_Text">
      <style:paragraph-properties fo:margin-top="0cm" fo:margin-bottom="0.247cm" style:contextual-spacing="false" fo:line-height="115%"/>
      <style:text-properties style:font-name="Liberation Serif" officeooo:rsid="0030fd94"/>
    </style:style>
    <style:style style:name="P13" style:family="paragraph" style:parent-style-name="Heading_20_3">
      <style:paragraph-properties fo:margin-left="0cm" fo:margin-right="0cm" fo:text-indent="0cm" style:auto-text-indent="false"/>
      <style:text-properties officeooo:paragraph-rsid="0008542a"/>
    </style:style>
    <style:style style:name="P14" style:family="paragraph" style:parent-style-name="Text_20_body" style:list-style-name="L5">
      <style:paragraph-properties fo:margin-left="0cm" fo:margin-right="0cm" fo:text-indent="0cm" style:auto-text-indent="false"/>
      <style:text-properties officeooo:rsid="0030fd94"/>
    </style:style>
    <style:style style:name="P15" style:family="paragraph" style:parent-style-name="Text_20_body">
      <style:text-properties officeooo:paragraph-rsid="0008542a"/>
    </style:style>
    <style:style style:name="P16" style:family="paragraph" style:parent-style-name="Heading_20_3">
      <style:paragraph-properties fo:margin-top="0cm" fo:margin-bottom="0.247cm" style:contextual-spacing="false" fo:line-height="115%"/>
      <style:text-properties officeooo:paragraph-rsid="0008542a"/>
    </style:style>
    <style:style style:name="P17" style:family="paragraph" style:parent-style-name="Text_20_body" style:list-style-name="L6">
      <style:paragraph-properties fo:margin-left="0cm" fo:margin-right="0cm" fo:text-indent="0cm" style:auto-text-indent="false"/>
      <style:text-properties officeooo:paragraph-rsid="0008542a"/>
    </style:style>
    <style:style style:name="P18" style:family="paragraph" style:parent-style-name="Heading_20_3">
      <style:text-properties officeooo:paragraph-rsid="0008542a"/>
    </style:style>
    <style:style style:name="P19" style:family="paragraph" style:parent-style-name="Text_20_body" style:list-style-name="L7">
      <style:paragraph-properties fo:margin-left="0cm" fo:margin-right="0cm" fo:text-indent="0cm" style:auto-text-indent="false"/>
      <style:text-properties officeooo:paragraph-rsid="0008542a"/>
    </style:style>
    <style:style style:name="P20" style:family="paragraph" style:parent-style-name="Text_20_body" style:list-style-name="L8">
      <style:paragraph-properties fo:margin-left="0cm" fo:margin-right="0cm" fo:text-indent="0cm" style:auto-text-indent="false"/>
      <style:text-properties officeooo:paragraph-rsid="0008542a"/>
    </style:style>
    <style:style style:name="P21" style:family="paragraph" style:parent-style-name="Text_20_body">
      <style:paragraph-properties fo:margin-left="0cm" fo:margin-right="0cm" fo:text-indent="0cm" style:auto-text-indent="false"/>
      <style:text-properties style:font-name="Liberation Serif" officeooo:rsid="001d7d39" officeooo:paragraph-rsid="0008542a"/>
    </style:style>
    <style:style style:name="P22" style:family="paragraph" style:parent-style-name="Heading_20_3">
      <style:paragraph-properties fo:margin-top="0cm" fo:margin-bottom="0.247cm" style:contextual-spacing="false" fo:line-height="115%"/>
      <style:text-properties style:font-name="Liberation Serif" officeooo:rsid="001d7d39" officeooo:paragraph-rsid="0008542a"/>
    </style:style>
    <style:style style:name="P23" style:family="paragraph" style:parent-style-name="Text_20_body" style:list-style-name="L9">
      <style:paragraph-properties fo:margin-left="0cm" fo:margin-right="0cm" fo:text-indent="0cm" style:auto-text-indent="false"/>
      <style:text-properties officeooo:rsid="0023bd61" officeooo:paragraph-rsid="0008542a"/>
    </style:style>
    <style:style style:name="P24" style:family="paragraph" style:parent-style-name="Text_20_body">
      <style:paragraph-properties fo:margin-left="0cm" fo:margin-right="0cm" fo:text-indent="0cm" style:auto-text-indent="false"/>
      <style:text-properties officeooo:rsid="0023bd61" officeooo:paragraph-rsid="0008542a"/>
    </style:style>
    <style:style style:name="P25" style:family="paragraph" style:parent-style-name="Preformatted_20_Text">
      <style:paragraph-properties fo:margin-left="0cm" fo:margin-right="0cm" fo:text-indent="0cm" style:auto-text-indent="false"/>
      <style:text-properties officeooo:paragraph-rsid="0008542a"/>
    </style:style>
    <style:style style:name="P26" style:family="paragraph" style:parent-style-name="Heading_20_2">
      <style:paragraph-properties fo:margin-left="0cm" fo:margin-right="0cm" fo:text-indent="0cm" style:auto-text-indent="false"/>
      <style:text-properties officeooo:paragraph-rsid="0008542a"/>
    </style:style>
    <style:style style:name="P27" style:family="paragraph" style:parent-style-name="Text_20_body">
      <style:paragraph-properties fo:margin-left="0cm" fo:margin-right="0cm" fo:text-indent="0cm" style:auto-text-indent="false"/>
      <style:text-properties officeooo:rsid="00261838" officeooo:paragraph-rsid="0008542a"/>
    </style:style>
    <style:style style:name="P28" style:family="paragraph" style:parent-style-name="Text_20_body" style:list-style-name="L10">
      <style:paragraph-properties fo:margin-left="0cm" fo:margin-right="0cm" fo:text-indent="0cm" style:auto-text-indent="false"/>
      <style:text-properties officeooo:rsid="00261838" officeooo:paragraph-rsid="0008542a"/>
    </style:style>
    <style:style style:name="P29" style:family="paragraph" style:parent-style-name="Heading_20_3">
      <style:paragraph-properties fo:margin-top="0cm" fo:margin-bottom="0.247cm" style:contextual-spacing="false" fo:line-height="115%"/>
      <style:text-properties officeooo:rsid="00261838" officeooo:paragraph-rsid="0008542a"/>
    </style:style>
    <style:style style:name="P30" style:family="paragraph" style:parent-style-name="Text_20_body" style:list-style-name="L11">
      <style:paragraph-properties fo:margin-left="0cm" fo:margin-right="0cm" fo:text-indent="0cm" style:auto-text-indent="false"/>
      <style:text-properties officeooo:rsid="00261838" officeooo:paragraph-rsid="0008542a"/>
    </style:style>
    <style:style style:name="P31" style:family="paragraph" style:parent-style-name="Text_20_body" style:list-style-name="L12">
      <style:paragraph-properties fo:margin-left="0cm" fo:margin-right="0cm" fo:text-indent="0cm" style:auto-text-indent="false"/>
      <style:text-properties officeooo:rsid="0030fd94" officeooo:paragraph-rsid="0008542a"/>
    </style:style>
    <style:style style:name="P32" style:family="paragraph" style:parent-style-name="Heading_20_2">
      <style:paragraph-properties fo:margin-top="0cm" fo:margin-bottom="0.247cm" style:contextual-spacing="false" fo:line-height="115%"/>
      <style:text-properties officeooo:rsid="0030fd94" officeooo:paragraph-rsid="0008542a"/>
    </style:style>
    <style:style style:name="P33" style:family="paragraph" style:parent-style-name="Text_20_body">
      <style:paragraph-properties fo:margin-left="0cm" fo:margin-right="0cm" fo:text-indent="0cm" style:auto-text-indent="false"/>
      <style:text-properties officeooo:rsid="0030fd94" officeooo:paragraph-rsid="0008542a"/>
    </style:style>
    <style:style style:name="P34" style:family="paragraph" style:parent-style-name="Text_20_body">
      <style:text-properties officeooo:rsid="0030fd94" officeooo:paragraph-rsid="0008542a"/>
    </style:style>
    <style:style style:name="P35" style:family="paragraph" style:parent-style-name="Preformatted_20_Text">
      <style:paragraph-properties fo:margin-left="0cm" fo:margin-right="0cm" fo:margin-top="0cm" fo:margin-bottom="0.247cm" style:contextual-spacing="false" fo:line-height="115%" fo:text-indent="0cm" style:auto-text-indent="false"/>
      <style:text-properties style:font-name="Liberation Serif" officeooo:rsid="0030fd94" officeooo:paragraph-rsid="0008542a"/>
    </style:style>
    <style:style style:name="P36" style:family="paragraph" style:parent-style-name="Preformatted_20_Text">
      <style:paragraph-properties fo:margin-top="0cm" fo:margin-bottom="0.247cm" style:contextual-spacing="false" fo:line-height="115%"/>
      <style:text-properties style:font-name="Liberation Serif" officeooo:rsid="0030fd94" officeooo:paragraph-rsid="0008542a"/>
    </style:style>
    <style:style style:name="P37" style:family="paragraph" style:parent-style-name="Text_20_body" style:list-style-name="L13">
      <style:paragraph-properties fo:margin-left="0cm" fo:margin-right="0cm" fo:text-indent="0cm" style:auto-text-indent="false"/>
      <style:text-properties officeooo:rsid="0030fd94"/>
    </style:style>
    <style:style style:name="T1" style:family="text">
      <style:text-properties style:font-name="Liberation Serif" fo:font-style="normal" officeooo:rsid="0030fd94" style:font-style-asian="normal" style:font-style-complex="normal"/>
    </style:style>
    <style:style style:name="T2" style:family="text">
      <style:text-properties style:font-name="Liberation Serif" fo:font-style="normal" style:font-style-asian="normal" style:font-style-complex="normal"/>
    </style:style>
    <style:style style:name="T3" style:family="text">
      <style:text-properties officeooo:rsid="001b3b9f"/>
    </style:style>
    <style:style style:name="T4" style:family="text">
      <style:text-properties fo:font-weight="normal" style:font-weight-asian="normal" style:font-weight-complex="normal"/>
    </style:style>
    <style:style style:name="T5" style:family="text">
      <style:text-properties style:font-name="Liberation Serif" fo:font-style="normal" officeooo:rsid="0008542a" style:font-style-asian="normal" style:font-style-complex="normal"/>
    </style:style>
    <style:style style:name="T6" style:family="text">
      <style:text-properties officeooo:rsid="001c3aa4"/>
    </style:style>
    <style:style style:name="T7" style:family="text">
      <style:text-properties officeooo:rsid="001d7d39"/>
    </style:style>
    <style:style style:name="T8" style:family="text">
      <style:text-properties style:font-name="Liberation Serif" fo:font-style="normal" fo:font-weight="bold" style:font-style-asian="normal" style:font-weight-asian="bold" style:font-style-complex="normal" style:font-weight-complex="bold"/>
    </style:style>
    <style:style style:name="T9" style:family="text">
      <style:text-properties style:font-name="Liberation Serif" fo:font-style="normal" officeooo:rsid="001d7d39" style:font-style-asian="normal" style:font-style-complex="normal"/>
    </style:style>
    <style:style style:name="T10" style:family="text">
      <style:text-properties style:font-name="Liberation Serif" fo:font-style="normal" officeooo:rsid="001f2933" style:font-style-asian="normal" style:font-style-complex="normal"/>
    </style:style>
    <style:style style:name="T11" style:family="text">
      <style:text-properties style:font-name="Liberation Serif" fo:font-style="normal" officeooo:rsid="001f9eca" style:font-style-asian="normal" style:font-style-complex="normal"/>
    </style:style>
    <style:style style:name="T12" style:family="text">
      <style:text-properties style:font-name="Liberation Serif" fo:font-style="normal" officeooo:rsid="0020aab8" style:font-style-asian="normal" style:font-style-complex="normal"/>
    </style:style>
    <style:style style:name="T13" style:family="text">
      <style:text-properties style:font-name="Liberation Serif" fo:font-style="normal" officeooo:rsid="0023bd61" style:font-style-asian="normal" style:font-style-complex="normal"/>
    </style:style>
    <style:style style:name="T14" style:family="text">
      <style:text-properties style:font-name="Liberation Serif" fo:font-style="normal" officeooo:rsid="00246d2a" style:font-style-asian="normal" style:font-style-complex="normal"/>
    </style:style>
    <style:style style:name="T15" style:family="text">
      <style:text-properties fo:color="#81d41a" loext:opacity="100%" style:font-name="Liberation Serif" fo:font-style="normal" officeooo:rsid="00246d2a" style:font-style-asian="normal" style:font-style-complex="normal"/>
    </style:style>
    <style:style style:name="T16" style:family="text">
      <style:text-properties style:font-name="Liberation Serif" fo:font-style="normal" officeooo:rsid="00261838" style:font-style-asian="normal" style:font-style-complex="normal"/>
    </style:style>
    <style:style style:name="T17" style:family="text">
      <style:text-properties fo:color="#81d41a" loext:opacity="100%" style:font-name="Liberation Serif" fo:font-style="normal" officeooo:rsid="00261838" style:font-style-asian="normal" style:font-style-complex="normal"/>
    </style:style>
    <style:style style:name="T18" style:family="text">
      <style:text-properties fo:font-style="normal" style:font-style-asian="normal" style:font-style-complex="normal"/>
    </style:style>
    <style:style style:name="T19" style:family="text">
      <style:text-properties style:font-name="Liberation Serif" fo:font-style="normal" officeooo:rsid="0027c8a2" style:font-style-asian="normal" style:font-style-complex="normal"/>
    </style:style>
    <style:style style:name="T20" style:family="text">
      <style:text-properties style:font-name="Liberation Serif" fo:font-style="normal" officeooo:rsid="002c9ebc" style:font-style-asian="normal" style:font-style-complex="normal"/>
    </style:style>
    <style:style style:name="T21" style:family="text">
      <style:text-properties style:font-name="Liberation Serif" fo:font-style="normal" officeooo:rsid="002e4976" style:font-style-asian="normal" style:font-style-complex="normal"/>
    </style:style>
    <style:style style:name="T22" style:family="text">
      <style:text-properties fo:font-variant="normal" fo:text-transform="none" fo:color="#000000" loext:opacity="100%" style:text-line-through-style="none" style:text-line-through-type="none" fo:font-family="Arial, sans-serif" fo:font-size="11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3" style:family="text">
      <style:text-properties style:font-name="Liberation Serif" fo:font-style="normal" fo:font-weight="normal" officeooo:rsid="002e4976" style:font-style-asian="normal" style:font-weight-asian="normal" style:font-style-complex="normal" style:font-weight-complex="normal"/>
    </style:style>
    <style:style style:name="T24" style:family="text">
      <style:text-properties style:font-name="Liberation Serif" fo:font-style="normal" fo:font-weight="normal" officeooo:rsid="002c9ebc" style:font-style-asian="normal" style:font-weight-asian="normal" style:font-style-complex="normal" style:font-weight-complex="normal"/>
    </style:style>
    <style:style style:name="T25" style:family="text">
      <style:text-properties style:font-name="Liberation Serif" fo:font-style="normal" officeooo:rsid="0038a874" style:font-style-asian="normal" style:font-style-complex="normal"/>
    </style:style>
    <style:style style:name="T26" style:family="text">
      <style:text-properties fo:font-style="normal" officeooo:rsid="0030fd94"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Presentación en ingles</text:span></text:span></text:p>
      <text:p text:style-name="P1"><text:span text:style-name="Strong_20_Emphasis"><text:span text:style-name="T1">This project presents the deployment of a secure remote access system using WireGuard VPN on a Linux server. The server is configured with a static IP address, a basic UFW firewall, and a restricted Apache web service that is only accessible through the VPN. Client devices receive their own cryptographic keys and virtual IP addresses, allowing them to connect safely to the private network. The result is a simple, efficient, and secure VPN environment that protects internal services and ensures encrypted communication between the server and its clients.</text:span></text:span></text:p>
      <text:p text:style-name="P1"><text:span text:style-name="Strong_20_Emphasis"><text:span text:style-name="T1">Este proyecto presenta la implementación de un sistema de acceso remoto seguro utilizando WireGuard VPN en un servidor Linux. El servidor se configura con una dirección IP fija, un firewall básico con UFW y un servidor web Apache, el cual solo puede ser accedido a través de la VPN. Cada cliente recibe sus propias claves criptográficas y una dirección IP virtual, lo que permite una conexión segura a la red privada. El resultado es un entorno VPN simple, eficiente y seguro que protege los servicios internos y garantiza comunicaciones cifradas entre el servidor y los clientes.</text:span></text:span></text:p>
      <text:p text:style-name="P1"><text:span text:style-name="Strong_20_Emphasis"><text:span text:style-name="T1"/></text:span></text:p>
      <text:h text:style-name="P2" text:outline-level="1"><text:span text:style-name="Strong_20_Emphasis"><text:span text:style-name="T2">2. Obxectivos</text:span></text:span></text:h>
      <text:h text:style-name="P3" text:outline-level="3"><text:span text:style-name="Strong_20_Emphasis">Obxectivo xeral</text:span></text:h>
      <text:p text:style-name="P4">Implantar, configurar e documentar unha VPN cliente-servidor con WireGuard sobre Ubuntu Server, permitindo acceso seguro á rede interna empresarial.</text:p>
      <text:h text:style-name="P3" text:outline-level="3"><text:span text:style-name="Strong_20_Emphasis">Obxectivos específicos</text:span></text:h>
      <text:list text:style-name="L1">
        <text:list-item>
          <text:p text:style-name="P5">Configurar IP fixa no servidor.</text:p>
        </text:list-item>
        <text:list-item>
          <text:p text:style-name="P5">Instalar e configurar WireGuard.</text:p>
        </text:list-item>
        <text:list-item>
          <text:p text:style-name="P5">Crear claves e perfís para clientes Linux e Windows.</text:p>
        </text:list-item>
        <text:list-item>
          <text:p text:style-name="P5">Configurar NAT e reenvío de paquetes.</text:p>
        </text:list-item>
        <text:list-item>
          <text:p text:style-name="P5">Protexer o servidor con UFW.</text:p>
        </text:list-item>
        <text:list-item>
          <text:p text:style-name="P5">Permitir acceso ao servidor Apache só a través da VPN.</text:p>
        </text:list-item>
        <text:list-item>
          <text:p text:style-name="P5">Verificar conectividade (ping, acceso web, reinicio).</text:p>
        </text:list-item>
        <text:list-item>
          <text:p text:style-name="P5">Documentar todo o proceso técnico e de usuario.</text:p>
        </text:list-item>
      </text:list>
      <text:p text:style-name="P1"><text:span text:style-name="Strong_20_Emphasis"><text:span text:style-name="T1"/></text:span></text:p>
      <text:h text:style-name="P2" text:outline-level="1"><text:span text:style-name="Strong_20_Emphasis"><text:span text:style-name="T2">3. Situación previa</text:span></text:span></text:h>
      <text:p text:style-name="P4">A empresa non dispón dun sistema seguro para acceder remotamente á súa rede interna. Actualmente só se pode acceder dende a LAN física. Isto supón limitacións operativas e riscos de seguridade.</text:p>
      <text:p text:style-name="P4"><text:soft-page-break/>WireGuard preséntase como unha solución moderna, lixeira e moi segura, que permite establecer unha rede privada virtual entre clientes remotos e a infraestrutura interna.</text:p>
      <text:h text:style-name="P2" text:outline-level="1"><text:span text:style-name="Strong_20_Emphasis"><text:span text:style-name="T2">4. Tecnoloxías empregadas</text:span></text:span></text:h>
      <text:list text:style-name="L2">
        <text:list-item>
          <text:p text:style-name="P6"><text:span text:style-name="Strong_20_Emphasis">Ubuntu Server 22.04</text:span></text:p>
        </text:list-item>
        <text:list-item>
          <text:p text:style-name="P6"><text:span text:style-name="Strong_20_Emphasis">WireGuard</text:span></text:p>
        </text:list-item>
        <text:list-item>
          <text:p text:style-name="P6"><text:span text:style-name="Strong_20_Emphasis">UFW</text:span></text:p>
        </text:list-item>
        <text:list-item>
          <text:p text:style-name="P6"><text:span text:style-name="Strong_20_Emphasis">Apache2</text:span></text:p>
        </text:list-item>
        <text:list-item>
          <text:p text:style-name="P6"><text:span text:style-name="Strong_20_Emphasis">VirtualBox</text:span></text:p>
        </text:list-item>
        <text:list-item>
          <text:p text:style-name="P6"><text:span text:style-name="Strong_20_Emphasis">Netplan</text:span></text:p>
        </text:list-item>
        <text:list-item>
          <text:p text:style-name="P6"><text:span text:style-name="Strong_20_Emphasis">Linux networking (iptables, sysctl)</text:span></text:p>
        </text:list-item>
      </text:list>
      <text:h text:style-name="P2" text:outline-level="1"><text:span text:style-name="Strong_20_Emphasis"><text:span text:style-name="T2">5. Solución proposta</text:span></text:span></text:h>
      <text:p text:style-name="P4">A solución consiste nun servidor Ubuntu con tres interfaces de rede:</text:p>
      <text:list text:style-name="L3">
        <text:list-item>
          <text:p text:style-name="P7"><text:span text:style-name="Strong_20_Emphasis">enp0s3 (Puente)</text:span> → acceso dende a rede real</text:p>
        </text:list-item>
        <text:list-item>
          <text:p text:style-name="P7"><text:span text:style-name="Strong_20_Emphasis">enp0s8 (NAT)</text:span> → acceso a Internet</text:p>
        </text:list-item>
        <text:list-item>
          <text:p text:style-name="P7"><text:span text:style-name="Strong_20_Emphasis">enp0s9 (Rede interna)</text:span> → acceso ao servidor Apache</text:p>
        </text:list-item>
      </text:list>
      <text:p text:style-name="P4">A VPN WireGuard crea unha rede virtual <text:span text:style-name="Strong_20_Emphasis">10.0.0.0/24</text:span>, onde:</text:p>
      <text:list text:style-name="L4">
        <text:list-item>
          <text:p text:style-name="P8">O servidor é <text:span text:style-name="Strong_20_Emphasis">10.0.0.1</text:span></text:p>
        </text:list-item>
        <text:list-item>
          <text:p text:style-name="P8">Os clientes son <text:span text:style-name="Strong_20_Emphasis">10.0.0.2</text:span>, <text:span text:style-name="Strong_20_Emphasis">10.0.0.3</text:span>, etc.</text:p>
        </text:list-item>
      </text:list>
      <text:h text:style-name="P3" text:outline-level="3"><text:span text:style-name="Strong_20_Emphasis"/></text:h>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h text:style-name="P3" text:outline-level="3"><text:soft-page-break/><text:span text:style-name="Strong_20_Emphasis">Diagrama de rede (captura en bloque)</text:span></text:h>
      <text:p text:style-name="P10"/>
      <text:p text:style-name="P11"><text:span text:style-name="Source_20_Text">---------------------------------------------------------</text:span></text:p>
      <text:p text:style-name="P12"><text:span text:style-name="Source_20_Text">| <text:s text:c="20"/>DIAGRAMA DE REDE <text:s text:c="17"/>|</text:span></text:p>
      <text:p text:style-name="P12"><text:span text:style-name="Source_20_Text">---------------------------------------------------------</text:span></text:p>
      <text:p text:style-name="P12"><text:span text:style-name="Source_20_Text">| <text:s text:c="2"/>Internet <text:s text:c="43"/>|</text:span></text:p>
      <text:p text:style-name="P12"><text:span text:style-name="Source_20_Text">| <text:s text:c="7"/>| <text:s text:c="45"/>|</text:span></text:p>
      <text:p text:style-name="P12"><text:span text:style-name="Source_20_Text">| <text:s text:c="2"/>[Router] <text:s text:c="43"/>|</text:span></text:p>
      <text:p text:style-name="P12"><text:span text:style-name="Source_20_Text">| <text:s text:c="7"/>| (192.168.1.x) <text:s text:c="31"/>|</text:span></text:p>
      <text:p text:style-name="P12"><text:span text:style-name="Source_20_Text">| <text:s text:c="7"/>| <text:s text:c="45"/>|</text:span></text:p>
      <text:p text:style-name="P12"><text:span text:style-name="Source_20_Text">| <text:s text:c="2"/>┌───────────────┐ <text:s text:c="34"/>|</text:span></text:p>
      <text:p text:style-name="P12"><text:span text:style-name="Source_20_Text">| <text:s text:c="2"/>| Ubuntu Server | <text:s text:c="34"/>|</text:span></text:p>
      <text:p text:style-name="P12"><text:span text:style-name="Source_20_Text">| <text:s text:c="2"/>| <text:s/>VPN + Apache | <text:s text:c="34"/>|</text:span></text:p>
      <text:p text:style-name="P12"><text:span text:style-name="Source_20_Text">| <text:s text:c="2"/>|---------------| <text:s text:c="34"/>|</text:span></text:p>
      <text:p text:style-name="P12"><text:span text:style-name="Source_20_Text">| <text:s text:c="2"/>| enp0s3: 192.168.1.27 (Puente) <text:s text:c="20"/>|</text:span></text:p>
      <text:p text:style-name="P12"><text:span text:style-name="Source_20_Text">| <text:s text:c="2"/>| enp0s8: 10.0.3.15 (NAT) <text:s text:c="26"/>|</text:span></text:p>
      <text:p text:style-name="P12"><text:span text:style-name="Source_20_Text">| <text:s text:c="2"/>| enp0s9: 192.168.1.10 (Rede interna) <text:s text:c="14"/>|</text:span></text:p>
      <text:p text:style-name="P12"><text:span text:style-name="Source_20_Text">| <text:s text:c="2"/>| wg0: <text:s text:c="3"/>10.0.0.1 (VPN) <text:s text:c="27"/>|</text:span></text:p>
      <text:p text:style-name="P12"><text:span text:style-name="Source_20_Text">| <text:s text:c="2"/>└───────────────┘ <text:s text:c="34"/>|</text:span></text:p>
      <text:p text:style-name="P12"><text:span text:style-name="Source_20_Text">| <text:s text:c="7"/>| <text:s text:c="45"/>|</text:span></text:p>
      <text:p text:style-name="P12"><text:span text:style-name="Source_20_Text">| <text:s text:c="2"/>Rede interna 192.168.1.0/24 <text:s text:c="24"/>|</text:span></text:p>
      <text:p text:style-name="P12"><text:span text:style-name="Source_20_Text">| <text:s text:c="7"/>| <text:s text:c="45"/>|</text:span></text:p>
      <text:p text:style-name="P12"><text:span text:style-name="Source_20_Text">| <text:s text:c="2"/>┌───────────────┐ <text:s text:c="34"/>|</text:span></text:p>
      <text:p text:style-name="P12"><text:span text:style-name="Source_20_Text">| <text:s text:c="2"/>| Servidor Web <text:s/>| <text:s text:c="34"/>|</text:span></text:p>
      <text:p text:style-name="P12"><text:span text:style-name="Source_20_Text">| <text:s text:c="2"/>| Apache <text:s text:c="7"/>| <text:s text:c="34"/>|</text:span></text:p>
      <text:p text:style-name="P12"><text:span text:style-name="Source_20_Text">| <text:s text:c="2"/>| 192.168.1.10 <text:s/>| <text:s text:c="34"/>|</text:span></text:p>
      <text:p text:style-name="P12"><text:span text:style-name="Source_20_Text">| <text:s text:c="2"/>└───────────────┘ <text:s text:c="34"/>|</text:span></text:p>
      <text:p text:style-name="P12"><text:span text:style-name="Source_20_Text">| <text:s text:c="54"/>|</text:span></text:p>
      <text:p text:style-name="P12"><text:span text:style-name="Source_20_Text">| <text:s text:c="2"/>Clientes VPN: <text:s text:c="38"/>|</text:span></text:p>
      <text:p text:style-name="P12"><text:span text:style-name="Source_20_Text">| <text:s text:c="2"/>- Windows → 10.0.0.3 <text:s text:c="31"/>|</text:span></text:p>
      <text:p text:style-name="P12"><text:span text:style-name="Source_20_Text">| <text:s text:c="2"/>- Ubuntu <text:s/>→ 10.0.0.2 <text:s text:c="31"/>|</text:span></text:p>
      <text:p text:style-name="P12"><text:span text:style-name="Source_20_Text">---------------------------------------------------------</text:span></text:p>
      <text:h text:style-name="P2" text:outline-level="1"><text:soft-page-break/><text:span text:style-name="Strong_20_Emphasis"><text:span text:style-name="T2">6. Planificación do proxecto</text:span></text:span></text:h>
      <text:h text:style-name="P3" text:outline-level="3"><text:span text:style-name="Strong_20_Emphasis">Diagrama de Gantt</text:span></text:h>
      <text:p text:style-name="P10"/>
      <text:p text:style-name="P11"><text:span text:style-name="Source_20_Text">---------------------------------------------------------</text:span></text:p>
      <text:p text:style-name="P12"><text:span text:style-name="Source_20_Text">| <text:s text:c="19"/>DIAGRAMA DE GANTT <text:s text:c="17"/>|</text:span></text:p>
      <text:p text:style-name="P12"><text:span text:style-name="Source_20_Text">---------------------------------------------------------</text:span></text:p>
      <text:p text:style-name="P12"><text:span text:style-name="Source_20_Text">| Tarefa <text:s text:c="24"/>Semana 1 2 3 4 5 6 <text:s text:c="5"/>|</text:span></text:p>
      <text:p text:style-name="P12"><text:span text:style-name="Source_20_Text">|-------------------------------------------------------|</text:span></text:p>
      <text:p text:style-name="P12"><text:span text:style-name="Source_20_Text">| Análise inicial <text:s text:c="16"/>████ <text:s text:c="17"/>|</text:span></text:p>
      <text:p text:style-name="P12"><text:span text:style-name="Source_20_Text">| Configuración de rede <text:s text:c="10"/>███████ <text:s text:c="13"/>|</text:span></text:p>
      <text:p text:style-name="P12"><text:span text:style-name="Source_20_Text">| Instalación de WireGuard <text:s text:c="7"/>█████ <text:s text:c="15"/>|</text:span></text:p>
      <text:p text:style-name="P12"><text:span text:style-name="Source_20_Text">| Configuración servidor VPN <text:s text:c="5"/>████████ <text:s text:c="11"/>|</text:span></text:p>
      <text:p text:style-name="P12"><text:span text:style-name="Source_20_Text">| Configuración clientes <text:s text:c="9"/>███████ <text:s text:c="12"/>|</text:span></text:p>
      <text:p text:style-name="P12"><text:span text:style-name="Source_20_Text">| Probas e validación <text:s text:c="12"/>████████ <text:s text:c="10"/>|</text:span></text:p>
      <text:p text:style-name="P12"><text:span text:style-name="Source_20_Text">| Documentación final <text:s text:c="12"/>███████████ <text:s text:c="7"/>|</text:span></text:p>
      <text:p text:style-name="P12"><text:span text:style-name="Source_20_Text">---------------------------------------------------------</text:span></text:p>
      <text:h text:style-name="P13" text:outline-level="3"><text:span text:style-name="Strong_20_Emphasis"><text:span text:style-name="T2">Presuposto</text:span></text:span></text:h>
      <text:list text:style-name="L5">
        <text:list-item>
          <text:p text:style-name="P14">Hardware: VirtualBox (0 €)</text:p>
        </text:list-item>
        <text:list-item>
          <text:p text:style-name="P14">Software: Ubuntu, WireGuard, Apache (0 €)</text:p>
        </text:list-item>
        <text:list-item>
          <text:p text:style-name="P14">Recursos humanos: 20–30 horas de traballo</text:p>
        </text:list-item>
      </text:list>
      <text:p text:style-name="P1"><text:span text:style-name="Strong_20_Emphasis"><text:span text:style-name="T1">7. Desenvolvemento e execución</text:span></text:span></text:p>
      <text:p text:style-name="P15"><text:span text:style-name="Strong_20_Emphasis">1. Aplicar la configuración de red </text:span></text:p>
      <text:h text:style-name="P16" text:outline-level="3"><text:span text:style-name="Strong_20_Emphasis">enp0s</text:span><text:span text:style-name="Strong_20_Emphasis"><text:span text:style-name="T3">3</text:span></text:span><text:span text:style-name="Strong_20_Emphasis">(Puente)</text:span></text:h>
      <text:list text:style-name="L6">
        <text:list-item>
          <text:p text:style-name="P17">Le da una IP de tu red real (por ejemplo 192.168.0.x).</text:p>
        </text:list-item>
        <text:list-item>
          <text:p text:style-name="P17">Es la interfaz que usarán los clientes externos para conectarse a la VPN.</text:p>
        </text:list-item>
      </text:list>
      <text:h text:style-name="P18" text:outline-level="3"><text:span text:style-name="Strong_20_Emphasis">enp0s</text:span><text:span text:style-name="Strong_20_Emphasis"><text:span text:style-name="T3">8</text:span></text:span><text:span text:style-name="Strong_20_Emphasis"> (NAT)</text:span></text:h>
      <text:list text:style-name="L7">
        <text:list-item>
          <text:p text:style-name="P19"><text:span text:style-name="Strong_20_Emphasis"><text:span text:style-name="T4">Le da Internet al servidor para instalar paquetes.</text:span></text:span></text:p>
        </text:list-item>
      </text:list>
      <text:h text:style-name="P16" text:outline-level="3"><text:span text:style-name="Strong_20_Emphasis">enp0s9 (Red interna)</text:span></text:h>
      <text:list text:style-name="L8">
        <text:list-item>
          <text:p text:style-name="P20">Es la red privada de la empresa.</text:p>
        </text:list-item>
        <text:list-item>
          <text:p text:style-name="P20">Aquí estará el servidor Apache.</text:p>
        </text:list-item>
        <text:list-item>
          <text:p text:style-name="P20"><text:span text:style-name="Strong_20_Emphasis">IP fija: 192.168.1.10</text:span></text:p>
        </text:list-item>
      </text:list>
      <text:p text:style-name="P1"><draw:frame draw:style-name="fr1" draw:name="Imagen1" text:anchor-type="char" svg:width="17cm" svg:height="9.155cm" draw:z-index="0"><draw:image xlink:href="Pictures/100000010000077F00000407D2A215E1.png" xlink:type="simple" xlink:show="embed" xlink:actuate="onLoad" draw:mime-type="image/png"/></draw:frame><text:soft-page-break/><text:span text:style-name="Strong_20_Emphasis"><text:span text:style-name="T5"/></text:span></text:p>
      <text:p text:style-name="P1"><text:span text:style-name="Strong_20_Emphasis">2. Ver las IP asignadas a cada tarjeta </text:span></text:p>
      <text:p text:style-name="P1"><text:span text:style-name="Strong_20_Emphasis"/></text:p>
      <text:p text:style-name="P1"><draw:frame draw:style-name="fr1" draw:name="Imagen2" text:anchor-type="char" svg:width="17cm" svg:height="9.144cm" draw:z-index="1"><draw:image xlink:href="Pictures/100000010000077F000004084802E5C2.png" xlink:type="simple" xlink:show="embed" xlink:actuate="onLoad" draw:mime-type="image/png"/></draw:frame><text:span text:style-name="Strong_20_Emphasis"/></text:p>
      <text:p text:style-name="P1"><text:span text:style-name="Strong_20_Emphasis">3. Activar el reenvío de paquetes</text:span></text:p>
      <text:p text:style-name="P1"><text:span text:style-name="Strong_20_Emphasis">Abre el archivo donde se habilita el reenvío de tráfico entre interfaces </text:span></text:p>
      <text:p text:style-name="P1"><draw:frame draw:style-name="fr1" draw:name="Imagen3" text:anchor-type="char" svg:width="17cm" svg:height="9.144cm" draw:z-index="2"><draw:image xlink:href="Pictures/100000010000077F00000408D05103D0.png" xlink:type="simple" xlink:show="embed" xlink:actuate="onLoad" draw:mime-type="image/png"/></draw:frame><text:soft-page-break/><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draw:frame draw:style-name="fr1" draw:name="Imagen4" text:anchor-type="char" svg:width="17cm" svg:height="9.132cm" draw:z-index="3"><draw:image xlink:href="Pictures/100000010000077F00000406B5B0061F.png" xlink:type="simple" xlink:show="embed" xlink:actuate="onLoad" draw:mime-type="image/png"/></draw:frame><text:span text:style-name="Strong_20_Emphasis"/></text:p>
      <text:p text:style-name="P1"><text:span text:style-name="Strong_20_Emphasis">Si está comentada con </text:span><text:span text:style-name="Source_20_Text">#</text:span><text:span text:style-name="Strong_20_Emphasis">, la borras.</text:span></text:p>
      <text:p text:style-name="P1">Permite que el servidor actúe como router entre la VPN (10.0.0.0/24) y la red interna (192.168.1.0/24). Sin esto, la VPN <text:span text:style-name="Strong_20_Emphasis">no funcionará</text:span>.</text:p>
      <text:p text:style-name="P1"><text:soft-page-break/><text:span text:style-name="Strong_20_Emphasis"/></text:p>
      <text:p text:style-name="P1"><draw:frame draw:style-name="fr1" draw:name="Imagen5" text:anchor-type="char" svg:width="17cm" svg:height="9.167cm" draw:z-index="4"><draw:image xlink:href="Pictures/100000010000077F0000040A1C443F00.png" xlink:type="simple" xlink:show="embed" xlink:actuate="onLoad" draw:mime-type="image/png"/></draw:frame><text:span text:style-name="Strong_20_Emphasis"/></text:p>
      <text:p text:style-name="P1"><text:span text:style-name="Strong_20_Emphasis">Activa el reenvío de paquetes en el kernel. </text:span></text:p>
      <text:p text:style-name="P1"><draw:frame draw:style-name="fr1" draw:name="Imagen6" text:anchor-type="char" svg:width="17cm" svg:height="9.155cm" draw:z-index="5"><draw:image xlink:href="Pictures/100000010000077F00000409D5DC0132.png" xlink:type="simple" xlink:show="embed" xlink:actuate="onLoad" draw:mime-type="image/png"/></draw:frame><text:span text:style-name="Strong_20_Emphasis"/></text:p>
      <text:p text:style-name="P1"><text:span text:style-name="Strong_20_Emphasis">4. Instalar WireGuard</text:span></text:p>
      <text:p text:style-name="P1"><text:span text:style-name="Strong_20_Emphasis"><text:span text:style-name="T6">Primero actualizamos <text:s/></text:span></text:span><text:span text:style-name="Strong_20_Emphasis">la lista de paquetes disponibles </text:span></text:p>
      <text:p text:style-name="P1"><draw:frame draw:style-name="fr1" draw:name="Imagen7" text:anchor-type="char" svg:width="17cm" svg:height="9.167cm" draw:z-index="6"><draw:image xlink:href="Pictures/100000010000077E0000040A46173F64.png" xlink:type="simple" xlink:show="embed" xlink:actuate="onLoad" draw:mime-type="image/png"/></draw:frame><text:soft-page-break/><text:span text:style-name="Strong_20_Emphasis"/></text:p>
      <text:p text:style-name="P1"><text:span text:style-name="Strong_20_Emphasis">Instala el servicio WireGuard en el servidor VPN. </text:span></text:p>
      <text:p text:style-name="P1"><draw:frame draw:style-name="fr1" draw:name="Imagen8" text:anchor-type="char" svg:width="17cm" svg:height="9.144cm" draw:z-index="7"><draw:image xlink:href="Pictures/100000010000077F0000040842B21CBE.png" xlink:type="simple" xlink:show="embed" xlink:actuate="onLoad" draw:mime-type="image/png"/></draw:frame><text:span text:style-name="Strong_20_Emphasis"/></text:p>
      <text:p text:style-name="P1"><text:span text:style-name="Strong_20_Emphasis">5. Crear las claves del servidor</text:span></text:p>
      <text:p text:style-name="P1"><text:span text:style-name="Strong_20_Emphasis">Crea</text:span><text:span text:style-name="Strong_20_Emphasis"><text:span text:style-name="T7">r</text:span></text:span><text:span text:style-name="Strong_20_Emphasis"> el directorio donde se guardarán las claves y configuraciones. </text:span></text:p>
      <text:p text:style-name="P1"><draw:frame draw:style-name="fr1" draw:name="Imagen9" text:anchor-type="char" svg:width="17cm" svg:height="9.155cm" draw:z-index="8"><draw:image xlink:href="Pictures/100000010000077F000004095AB60CE1.png" xlink:type="simple" xlink:show="embed" xlink:actuate="onLoad" draw:mime-type="image/png"/></draw:frame><text:soft-page-break/><text:span text:style-name="Strong_20_Emphasis"/></text:p>
      <text:p text:style-name="P1"><text:span text:style-name="Strong_20_Emphasis">Restringe permisos por seguridad. </text:span></text:p>
      <text:p text:style-name="P1"><draw:frame draw:style-name="fr1" draw:name="Imagen10" text:anchor-type="char" svg:width="17cm" svg:height="9.144cm" draw:z-index="9"><draw:image xlink:href="Pictures/100000010000077F00000408958D8EA7.png" xlink:type="simple" xlink:show="embed" xlink:actuate="onLoad" draw:mime-type="image/png"/></draw:frame><text:span text:style-name="Strong_20_Emphasis"/></text:p>
      <text:p text:style-name="P1"><text:span text:style-name="Strong_20_Emphasis">Entra</text:span><text:span text:style-name="Strong_20_Emphasis"><text:span text:style-name="T6">r</text:span></text:span><text:span text:style-name="Strong_20_Emphasis"> en la carpeta donde se guardarán las claves y configuraciones de WireGuard. </text:span></text:p>
      <text:p text:style-name="P1"><draw:frame draw:style-name="fr1" draw:name="Imagen11" text:anchor-type="char" svg:width="17cm" svg:height="9.132cm" draw:z-index="10"><draw:image xlink:href="Pictures/100000010000077F00000406AF8E9880.png" xlink:type="simple" xlink:show="embed" xlink:actuate="onLoad" draw:mime-type="image/png"/></draw:frame><text:soft-page-break/><text:span text:style-name="Strong_20_Emphasis"/></text:p>
      <text:p text:style-name="P1"><text:span text:style-name="Emphasis"><text:span text:style-name="T8">Este comando genera la clave privada y la clave pública del servidor VPN y las guarda en los archivos </text:span></text:span><text:span text:style-name="Source_20_Text"><text:span text:style-name="T8">server.key</text:span></text:span><text:span text:style-name="Emphasis"><text:span text:style-name="T8"> y </text:span></text:span><text:span text:style-name="Source_20_Text"><text:span text:style-name="T8">server.pub</text:span></text:span><text:span text:style-name="Emphasis"><text:span text:style-name="T8">.</text:span></text:span><text:span text:style-name="Strong_20_Emphasis"><text:span text:style-name="T8"> </text:span></text:span></text:p>
      <text:p text:style-name="P1"><draw:frame draw:style-name="fr1" draw:name="Imagen12" text:anchor-type="char" svg:width="17cm" svg:height="9.132cm" draw:z-index="11"><draw:image xlink:href="Pictures/100000010000077F000004095876379E.png" xlink:type="simple" xlink:show="embed" xlink:actuate="onLoad" draw:mime-type="image/png"/></draw:frame><text:span text:style-name="Strong_20_Emphasis"><text:span text:style-name="T9"/></text:span></text:p>
      <text:p text:style-name="P1"><text:span text:style-name="Strong_20_Emphasis"><text:span text:style-name="T9">6. Crear el archivo de configuración de la VPN</text:span></text:span></text:p>
      <text:p text:style-name="P1"><text:span text:style-name="Strong_20_Emphasis"><text:span text:style-name="T9">Abre el archivo donde se configura la interfaz VPN wg0. </text:span></text:span></text:p>
      <text:h text:style-name="P13" text:outline-level="3"><text:span text:style-name="Strong_20_Emphasis"><text:span text:style-name="T9">Address = 10.0.0.1/24</text:span></text:span></text:h>
      <text:p text:style-name="P21"><text:span text:style-name="Emphasis">P del servidor dentro de la red virtual de WireGuard.</text:span></text:p>
      <text:h text:style-name="P22" text:outline-level="3"><text:soft-page-break/><text:span text:style-name="Strong_20_Emphasis">ListenPort = 51820</text:span></text:h>
      <text:p text:style-name="P21"><text:span text:style-name="Emphasis">Puerto UDP donde escuchará la VPN.</text:span></text:p>
      <text:h text:style-name="P22" text:outline-level="3"><text:span text:style-name="Strong_20_Emphasis">PrivateKey = …</text:span></text:h>
      <text:p text:style-name="P21"><text:span text:style-name="Emphasis">Clave privada del servidor, generada previamente con wg genkey.</text:span></text:p>
      <text:h text:style-name="P22" text:outline-level="3"><text:span text:style-name="Strong_20_Emphasis">PostUp / PostDown</text:span></text:h>
      <text:p text:style-name="P21"><text:span text:style-name="Emphasis">Reglas de iptables que permiten enrutar tráfico entre la VPN y la red interna 192.168.1.0/24.</text:span></text:p>
      <text:p text:style-name="P1"/>
      <text:p text:style-name="P1"><draw:frame draw:style-name="fr1" draw:name="Imagen13" text:anchor-type="char" svg:width="17cm" svg:height="9.132cm" draw:z-index="12"><draw:image xlink:href="Pictures/100000010000077F00000407F9292928.png" xlink:type="simple" xlink:show="embed" xlink:actuate="onLoad" draw:mime-type="image/png"/></draw:frame><text:span text:style-name="Strong_20_Emphasis"><text:span text:style-name="T10"/></text:span></text:p>
      <text:p text:style-name="P1"><draw:frame draw:style-name="fr2" draw:name="Imagen14" text:anchor-type="char" svg:width="17cm" svg:height="9.132cm" draw:z-index="13"><draw:image xlink:href="Pictures/100000010000077D00000408D0ED4B68.png" xlink:type="simple" xlink:show="embed" xlink:actuate="onLoad" draw:mime-type="image/png"/></draw:frame><text:span text:style-name="Strong_20_Emphasis"><text:span text:style-name="T11"/></text:span></text:p>
      <text:p text:style-name="P1"><text:soft-page-break/><text:span text:style-name="Strong_20_Emphasis"><text:span text:style-name="T11">7. Activar la interfaz VPN wg0</text:span></text:span></text:p>
      <text:p text:style-name="P1"><text:span text:style-name="Strong_20_Emphasis"><text:span text:style-name="T11">Hace que la VPN se active automáticamente al iniciar el sistema. </text:span></text:span></text:p>
      <text:p text:style-name="P1"><draw:frame draw:style-name="fr1" draw:name="Imagen15" text:anchor-type="char" svg:width="17cm" svg:height="9.132cm" draw:z-index="14"><draw:image xlink:href="Pictures/100000010000077F00000407FC587649.png" xlink:type="simple" xlink:show="embed" xlink:actuate="onLoad" draw:mime-type="image/png"/></draw:frame><text:span text:style-name="Strong_20_Emphasis"><text:span text:style-name="T11"/></text:span></text:p>
      <text:p text:style-name="P1"><text:span text:style-name="Strong_20_Emphasis"><text:span text:style-name="T11">Arranca la interfaz VPN usando la configuración que acabas de crear</text:span></text:span></text:p>
      <text:p text:style-name="P1"><draw:frame draw:style-name="fr2" draw:name="Imagen16" text:anchor-type="char" svg:width="17cm" svg:height="9.132cm" draw:z-index="15"><draw:image xlink:href="Pictures/100000010000077F00000406CFEEFDA8.png" xlink:type="simple" xlink:show="embed" xlink:actuate="onLoad" draw:mime-type="image/png"/></draw:frame><text:span text:style-name="Strong_20_Emphasis"><text:span text:style-name="T12"/></text:span></text:p>
      <text:p text:style-name="P1"><text:span text:style-name="Strong_20_Emphasis"><text:span text:style-name="T12">Muestra si la interfaz wg0 se ha creado correctamente y si hay errores.</text:span></text:span></text:p>
      <text:p text:style-name="P1"><draw:frame draw:style-name="fr1" draw:name="Imagen17" text:anchor-type="char" svg:width="17cm" svg:height="9.119cm" draw:z-index="16"><draw:image xlink:href="Pictures/100000010000077F0000040584D5A665.png" xlink:type="simple" xlink:show="embed" xlink:actuate="onLoad" draw:mime-type="image/png"/></draw:frame><text:soft-page-break/><text:span text:style-name="Strong_20_Emphasis"><text:span text:style-name="T12"/></text:span></text:p>
      <text:p text:style-name="P1"><text:span text:style-name="Strong_20_Emphasis"><text:span text:style-name="T12">Comprueba que WireGuard ha creado la interfaz virtual con la IP 10.0.0.1</text:span></text:span></text:p>
      <text:p text:style-name="P1"><draw:frame draw:style-name="fr2" draw:name="Imagen18" text:anchor-type="char" svg:width="17cm" svg:height="9.144cm" draw:z-index="17"><draw:image xlink:href="Pictures/100000010000077F00000408CFD6E909.png" xlink:type="simple" xlink:show="embed" xlink:actuate="onLoad" draw:mime-type="image/png"/></draw:frame><text:span text:style-name="Strong_20_Emphasis"><text:span text:style-name="T12"/></text:span></text:p>
      <text:p text:style-name="P1"><text:span text:style-name="Strong_20_Emphasis"><text:span text:style-name="T12">Muestra la clave pública, el puerto y los peers (cuando los añadas).</text:span></text:span></text:p>
      <text:p text:style-name="P1"><draw:frame draw:style-name="fr1" draw:name="Imagen19" text:anchor-type="char" svg:width="17cm" svg:height="9.155cm" draw:z-index="18"><draw:image xlink:href="Pictures/100000010000077F00000409135A3702.png" xlink:type="simple" xlink:show="embed" xlink:actuate="onLoad" draw:mime-type="image/png"/></draw:frame><text:soft-page-break/><text:span text:style-name="Strong_20_Emphasis"><text:span text:style-name="T12"/></text:span></text:p>
      <text:p text:style-name="P1"><text:span text:style-name="Strong_20_Emphasis"><text:span text:style-name="T12">Conectar CLIENTE UBUNTU a la VPN</text:span></text:span></text:p>
      <text:p text:style-name="P1"><text:span text:style-name="Strong_20_Emphasis"><text:span text:style-name="T12">Instala</text:span></text:span><text:span text:style-name="Strong_20_Emphasis"><text:span text:style-name="T13">r</text:span></text:span><text:span text:style-name="Strong_20_Emphasis"><text:span text:style-name="T12"> el programa WireGuard en el cliente Ubuntu para que pueda conectarse a la VPN.</text:span></text:span></text:p>
      <text:p text:style-name="P1"><draw:frame draw:style-name="fr1" draw:name="Imagen20" text:anchor-type="char" svg:width="17cm" svg:height="9.155cm" draw:z-index="19"><draw:image xlink:href="Pictures/100000010000077F000004094B512BF3.png" xlink:type="simple" xlink:show="embed" xlink:actuate="onLoad" draw:mime-type="image/png"/></draw:frame><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oft-page-break/><text:span text:style-name="Strong_20_Emphasis"><text:span text:style-name="T2">Crea dos claves:</text:span></text:span></text:p>
      <text:list text:style-name="L9">
        <text:list-item>
          <text:p text:style-name="P23"><text:span text:style-name="Strong_20_Emphasis">client_ubuntu.key</text:span> → clave privada del cliente</text:p>
        </text:list-item>
        <text:list-item>
          <text:p text:style-name="P23"><text:span text:style-name="Strong_20_Emphasis">client_ubuntu.pub</text:span> → clave pública del cliente</text:p>
        </text:list-item>
      </text:list>
      <text:p text:style-name="P24">La clave privada se queda en el cliente. La clave pública se envía al servidor.</text:p>
      <text:p text:style-name="P1"><draw:frame draw:style-name="fr2" draw:name="Imagen21" text:anchor-type="char" svg:width="17cm" svg:height="9.132cm" draw:z-index="20"><draw:image xlink:href="Pictures/100000010000077F000004060F08F170.png" xlink:type="simple" xlink:show="embed" xlink:actuate="onLoad" draw:mime-type="image/png"/></draw:frame><text:span text:style-name="Strong_20_Emphasis"><text:span text:style-name="T13"/></text:span></text:p>
      <text:p text:style-name="P1"><text:span text:style-name="Strong_20_Emphasis"><text:span text:style-name="T13">Pasar la clave pública al servidor</text:span></text:span></text:p>
      <text:p text:style-name="P1"><text:span text:style-name="Strong_20_Emphasis"><text:span text:style-name="T13">Ver la clave pública en el cliente:</text:span></text:span></text:p>
      <text:p text:style-name="P1"><draw:frame draw:style-name="fr1" draw:name="Imagen21 Copia 1" text:anchor-type="char" svg:width="17cm" svg:height="9.132cm" draw:z-index="21"><draw:image xlink:href="Pictures/100000010000077F000004060F08F170.png" xlink:type="simple" xlink:show="embed" xlink:actuate="onLoad" draw:mime-type="image/png"/></draw:frame><text:span text:style-name="Strong_20_Emphasis"><text:span text:style-name="T14"/></text:span></text:p>
      <text:p text:style-name="P1"><text:span text:style-name="Strong_20_Emphasis"><text:span text:style-name="T14"/></text:span></text:p>
      <text:p text:style-name="P1"><text:soft-page-break/><text:span text:style-name="Strong_20_Emphasis"><text:span text:style-name="T14">Ahora vas al servidor VPN y editas este fichero:</text:span></text:span></text:p>
      <text:p text:style-name="P25"><text:span text:style-name="Strong_20_Emphasis"><text:span text:style-name="T15">sudo nano /etc/wireguard/wg0.conf</text:span></text:span></text:p>
      <text:p text:style-name="P25"><text:span text:style-name="Strong_20_Emphasis"><text:span text:style-name="T14"/></text:span></text:p>
      <text:p text:style-name="P25"><draw:frame draw:style-name="fr2" draw:name="Imagen22" text:anchor-type="char" svg:width="17cm" svg:height="9.132cm" draw:z-index="22"><draw:image xlink:href="Pictures/100000010000077F000004099F1C96C3.png" xlink:type="simple" xlink:show="embed" xlink:actuate="onLoad" draw:mime-type="image/png"/></draw:frame><text:span text:style-name="Strong_20_Emphasis"><text:span text:style-name="T14"/></text:span></text:p>
      <text:p text:style-name="P1"><text:span text:style-name="Strong_20_Emphasis"><text:span text:style-name="T14">Reiniciar WireGuard en el servidor</text:span></text:span></text:p>
      <text:h text:style-name="P26" text:outline-level="2"><draw:frame draw:style-name="fr1" draw:name="Imagen23" text:anchor-type="char" svg:width="17cm" svg:height="9.155cm" draw:z-index="23"><draw:image xlink:href="Pictures/100000010000077F0000040C81AB3430.png" xlink:type="simple" xlink:show="embed" xlink:actuate="onLoad" draw:mime-type="image/png"/></draw:frame><text:span text:style-name="Strong_20_Emphasis"><text:span text:style-name="T16"/></text:span></text:h>
      <text:p text:style-name="P1"><text:span text:style-name="Strong_20_Emphasis"><text:span text:style-name="T16"/></text:span></text:p>
      <text:h text:style-name="P26" text:outline-level="2"><text:soft-page-break/><text:span text:style-name="Strong_20_Emphasis"><text:span text:style-name="T2"/></text:span></text:h>
      <text:h text:style-name="P26" text:outline-level="2"><text:span text:style-name="Strong_20_Emphasis"><text:span text:style-name="T2">Crear el archivo de configuración del cliente</text:span></text:span></text:h>
      <text:p text:style-name="P27">En el cliente Ubuntu creamos el archivo donde irá la configuración de la VP</text:p>
      <text:p text:style-name="P25"><text:span text:style-name="Strong_20_Emphasis"><text:span text:style-name="T17">sudo nano /etc/wireguard/client.conf</text:span></text:span></text:p>
      <text:p text:style-name="P1"><text:span text:style-name="Strong_20_Emphasis"><text:span text:style-name="T16"/></text:span></text:p>
      <text:h text:style-name="P13" text:outline-level="3"><text:span text:style-name="Source_20_Text"><text:span text:style-name="T18">[Interface]</text:span></text:span></text:h>
      <text:p text:style-name="P27">Es la configuración <text:span text:style-name="Strong_20_Emphasis">del cliente</text:span>.</text:p>
      <text:list text:style-name="L10">
        <text:list-item>
          <text:p text:style-name="P28"><text:span text:style-name="Strong_20_Emphasis">Address = 10.0.0.2/24</text:span> IP del cliente dentro de la red virtual de WireGuard. El servidor es 10.0.0.1, así que este cliente es 10.0.0.2.</text:p>
        </text:list-item>
        <text:list-item>
          <text:p text:style-name="P28"><text:span text:style-name="Strong_20_Emphasis">PrivateKey = …</text:span> Clave privada del cliente Ubuntu. Se genera en el propio cliente y <text:span text:style-name="Strong_20_Emphasis">no se comparte</text:span>.</text:p>
        </text:list-item>
        <text:list-item>
          <text:p text:style-name="P28"><text:span text:style-name="Strong_20_Emphasis">DNS = 1.1.1.1</text:span> Servidor DNS que usará el cliente cuando esté conectado a la VPN.</text:p>
        </text:list-item>
      </text:list>
      <text:h text:style-name="P29" text:outline-level="3">🔹 <text:span text:style-name="Source_20_Text">[Peer]</text:span></text:h>
      <text:p text:style-name="P27">Es la configuración <text:span text:style-name="Strong_20_Emphasis">del servidor al que se conecta el cliente</text:span>.</text:p>
      <text:list text:style-name="L11">
        <text:list-item>
          <text:p text:style-name="P30"><text:span text:style-name="Strong_20_Emphasis">PublicKey = …</text:span> Clave pública del servidor WireGuard. Permite verificar que el cliente se conecta al servidor correcto.</text:p>
        </text:list-item>
        <text:list-item>
          <text:p text:style-name="P30"><text:span text:style-name="Strong_20_Emphasis">Endpoint = IP:PUERTO</text:span> Dirección real del servidor y puerto donde escucha WireGuard. Ejemplo: <text:span text:style-name="Source_20_Text">192.168.1.10:51820</text:span></text:p>
        </text:list-item>
        <text:list-item>
          <text:p text:style-name="P30"><text:span text:style-name="Strong_20_Emphasis">AllowedIPs = 0.0.0.0/0</text:span> Todo el tráfico del cliente pasa por la VPN. (Full tunnel)</text:p>
        </text:list-item>
        <text:list-item>
          <text:p text:style-name="P30"><text:span text:style-name="Strong_20_Emphasis">PersistentKeepalive = 25</text:span> Mantiene la conexión activa aunque el cliente esté detrás de NAT.</text:p>
        </text:list-item>
      </text:list>
      <text:p text:style-name="P1"><draw:frame draw:style-name="fr2" draw:name="Imagen24" text:anchor-type="char" svg:width="17cm" svg:height="9.132cm" draw:z-index="24"><draw:image xlink:href="Pictures/100000010000077F00000408A250214C.png" xlink:type="simple" xlink:show="embed" xlink:actuate="onLoad" draw:mime-type="image/png"/></draw:frame><text:span text:style-name="Strong_20_Emphasis"><text:span text:style-name="T19"/></text:span></text:p>
      <text:p text:style-name="P1"><text:soft-page-break/><text:span text:style-name="Strong_20_Emphasis"><text:span text:style-name="T19">Activar la VPN en el cliente Ubuntu</text:span></text:span></text:p>
      <text:p text:style-name="P1"><draw:frame draw:style-name="fr2" draw:name="Imagen25" text:anchor-type="char" svg:width="17cm" svg:height="9.155cm" draw:z-index="25"><draw:image xlink:href="Pictures/100000010000077F0000040610002C26.png" xlink:type="simple" xlink:show="embed" xlink:actuate="onLoad" draw:mime-type="image/png"/></draw:frame><text:span text:style-name="Strong_20_Emphasis"><text:span text:style-name="T19"/></text:span></text:p>
      <text:p text:style-name="P1"><text:span text:style-name="Strong_20_Emphasis"><text:span text:style-name="T19"/></text:span></text:p>
      <text:p text:style-name="P1"><text:span text:style-name="Strong_20_Emphasis"><text:span text:style-name="T19"/></text:span></text:p>
      <text:p text:style-name="P1"><text:span text:style-name="Strong_20_Emphasis"><text:span text:style-name="T19">Instalar el firewall UFW</text:span></text:span></text:p>
      <text:p text:style-name="P1"><draw:frame draw:style-name="fr2" draw:name="Imagen26" text:anchor-type="char" svg:width="17cm" svg:height="9.132cm" draw:z-index="26"><draw:image xlink:href="Pictures/100000010000077F000004064229ADF2.png" xlink:type="simple" xlink:show="embed" xlink:actuate="onLoad" draw:mime-type="image/png"/></draw:frame><text:span text:style-name="Strong_20_Emphasis"><text:span text:style-name="T19"/></text:span></text:p>
      <text:p text:style-name="P1"><text:span text:style-name="Strong_20_Emphasis"><text:span text:style-name="T19">Permitir el acceso por SSH (puerto 22)</text:span></text:span></text:p>
      <text:p text:style-name="P1"><draw:frame draw:style-name="fr1" draw:name="Imagen27" text:anchor-type="char" svg:width="17cm" svg:height="9.132cm" draw:z-index="27"><draw:image xlink:href="Pictures/100000010000077F000004069A98B7DD.png" xlink:type="simple" xlink:show="embed" xlink:actuate="onLoad" draw:mime-type="image/png"/></draw:frame><text:soft-page-break/><text:span text:style-name="Strong_20_Emphasis"><text:span text:style-name="T19"/></text:span></text:p>
      <text:p text:style-name="P1"><text:span text:style-name="Strong_20_Emphasis"><text:span text:style-name="T19">Permitir el puerto de WireGuard (51820/UDP)</text:span></text:span></text:p>
      <text:p text:style-name="P1"><draw:frame draw:style-name="fr1" draw:name="Imagen28" text:anchor-type="char" svg:width="17cm" svg:height="9.132cm" draw:z-index="28"><draw:image xlink:href="Pictures/100000010000077E00000406AD972937.png" xlink:type="simple" xlink:show="embed" xlink:actuate="onLoad" draw:mime-type="image/png"/></draw:frame><text:span text:style-name="Strong_20_Emphasis"><text:span text:style-name="T19"/></text:span></text:p>
      <text:p text:style-name="P1"><text:span text:style-name="Strong_20_Emphasis"><text:span text:style-name="T19">Activar el firewall / Comprobar el estado del firewall</text:span></text:span></text:p>
      <text:p text:style-name="P1"><draw:frame draw:style-name="fr1" draw:name="Imagen29" text:anchor-type="char" svg:width="17cm" svg:height="9.137cm" draw:z-index="29"><draw:image xlink:href="Pictures/100000010000077D00000406E942829D.png" xlink:type="simple" xlink:show="embed" xlink:actuate="onLoad" draw:mime-type="image/png"/></draw:frame><text:soft-page-break/><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Actualizar repositorios e instalar Apache</text:span></text:span></text:p>
      <text:p text:style-name="P1"><draw:frame draw:style-name="fr1" draw:name="Imagen30" text:anchor-type="char" svg:width="17cm" svg:height="9.137cm" draw:z-index="30"><draw:image xlink:href="Pictures/100000010000077D00000407325DA9FD.png" xlink:type="simple" xlink:show="embed" xlink:actuate="onLoad" draw:mime-type="image/png"/></draw:frame><text:span text:style-name="Strong_20_Emphasis"><text:span text:style-name="T21"/></text:span></text:p>
      <text:p text:style-name="P1"><draw:frame draw:style-name="fr2" draw:name="Imagen31" text:anchor-type="char" svg:width="17cm" svg:height="9.17cm" draw:z-index="31"><draw:image xlink:href="Pictures/100000010000077600000407CA3541C8.png" xlink:type="simple" xlink:show="embed" xlink:actuate="onLoad" draw:mime-type="image/png"/></draw:frame><text:soft-page-break/><text:span text:style-name="Strong_20_Emphasis"><text:span text:style-name="T21"/></text:span></text:p>
      <text:p text:style-name="P1"><draw:frame draw:style-name="fr1" draw:name="Imagen32" text:anchor-type="char" svg:width="17cm" svg:height="9.121cm" draw:z-index="32"><draw:image xlink:href="Pictures/10000001000007790000040204CE3EEA.png" xlink:type="simple" xlink:show="embed" xlink:actuate="onLoad" draw:mime-type="image/png"/></draw:frame><text:span text:style-name="Strong_20_Emphasis"><text:span text:style-name="T20"/></text:span></text:p>
      <text:p text:style-name="P1"><text:span text:style-name="Strong_20_Emphasis"><text:span text:style-name="T20">Comprobar que Apache está activo</text:span></text:span></text:p>
      <text:p text:style-name="P1"><draw:frame draw:style-name="fr1" draw:name="Imagen33" text:anchor-type="char" svg:width="17cm" svg:height="9.132cm" draw:z-index="33"><draw:image xlink:href="Pictures/100000010000077F00000407A9174DBE.png" xlink:type="simple" xlink:show="embed" xlink:actuate="onLoad" draw:mime-type="image/png"/></draw:frame><text:soft-page-break/><text:span text:style-name="Strong_20_Emphasis"><text:span text:style-name="T20"/></text:span></text:p>
      <text:p text:style-name="P1"><text:span text:style-name="Strong_20_Emphasis"><text:span text:style-name="T20">Configurar o firewall para permitir só acceso desde a VPN</text:span></text:span></text:p>
      <text:p text:style-name="P1"><draw:frame draw:style-name="fr1" draw:name="Imagen34" text:anchor-type="char" svg:width="17cm" svg:height="9.132cm" draw:z-index="34"><draw:image xlink:href="Pictures/100000010000077F00000407A9174DBE.png" xlink:type="simple" xlink:show="embed" xlink:actuate="onLoad" draw:mime-type="image/png"/></draw:frame><text:span text:style-name="Strong_20_Emphasis"><text:span text:style-name="T20"/></text:span></text:p>
      <text:p text:style-name="P1"><text:bookmark text:name="docs-internal-guid-ee315f3d-7fff-e2e7-b0b2-2c0e6557ac25"/><text:span text:style-name="Strong_20_Emphasis"><text:span text:style-name="T22">sudo ufw allow from 10.0.0.0/24 to any port 80</text:span></text:span></text:p>
      <text:p text:style-name="P1"><text:span text:style-name="Strong_20_Emphasis"><text:span text:style-name="T23">P</text:span></text:span><text:span text:style-name="Strong_20_Emphasis"><text:span text:style-name="T24">ermitimos o acceso ao porto 80 unicamente desde a rede da VPN (10.0.0.0/24).</text:span></text:span></text:p>
      <text:p text:style-name="P1"><text:bookmark text:name="docs-internal-guid-a3df4a2b-7fff-3ccc-51ce-88fded454f06"/><text:span text:style-name="Strong_20_Emphasis"><text:span text:style-name="T22">sudo ufw deny 80/tcp</text:span></text:span></text:p>
      <text:p text:style-name="P1"><text:span text:style-name="Strong_20_Emphasis"><text:span text:style-name="T24">Bloqueamos o acceso ao porto 80 desde calquera outra rede externa, garantindo que Apache só sexa accesible a través da VPN.</text:span></text:span></text:p>
      <text:p text:style-name="P1"><text:span text:style-name="Strong_20_Emphasis"><text:span text:style-name="T20"/></text:span></text:p>
      <text:p text:style-name="P1"><text:soft-page-break/><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20"/></text:span></text:p>
      <text:p text:style-name="P1"><text:span text:style-name="Strong_20_Emphasis"><text:span text:style-name="T1">Descarga do instalador oficial de WireGuard para Windows desde a páxina web.</text:span></text:span></text:p>
      <text:p text:style-name="P1"><draw:frame draw:style-name="fr2" draw:name="Imagen35" text:anchor-type="char" svg:width="17cm" svg:height="9.132cm" draw:z-index="35"><draw:image xlink:href="Pictures/100000010000077F00000407EEA376C5.png" xlink:type="simple" xlink:show="embed" xlink:actuate="onLoad" draw:mime-type="image/png"/></draw:frame><text:span text:style-name="Strong_20_Emphasis"><text:span text:style-name="T1"/></text:span></text:p>
      <text:p text:style-name="P1"><text:span text:style-name="Strong_20_Emphasis"><text:span text:style-name="T1">Instalación de WireGuard en Windows mediante o asistente do instalador.</text:span></text:span></text:p>
      <text:p text:style-name="P1"><draw:frame draw:style-name="fr1" draw:name="Imagen36" text:anchor-type="char" svg:width="17cm" svg:height="9.132cm" draw:z-index="36"><draw:image xlink:href="Pictures/100000010000077F00000407F22D12F3.png" xlink:type="simple" xlink:show="embed" xlink:actuate="onLoad" draw:mime-type="image/png"/></draw:frame><text:soft-page-break/><text:span text:style-name="Strong_20_Emphasis"><text:span text:style-name="T1"/></text:span></text:p>
      <text:p text:style-name="P1"><draw:frame draw:style-name="fr1" draw:name="Imagen37" text:anchor-type="char" svg:width="17cm" svg:height="9.144cm" draw:z-index="37"><draw:image xlink:href="Pictures/100000010000077F0000040888083972.png" xlink:type="simple" xlink:show="embed" xlink:actuate="onLoad" draw:mime-type="image/png"/></draw:frame><text:span text:style-name="Strong_20_Emphasis"><text:span text:style-name="T1"/></text:span></text:p>
      <text:p text:style-name="P1"><text:span text:style-name="Strong_20_Emphasis"><text:span text:style-name="T25"/></text:span></text:p>
      <text:p text:style-name="P1"><draw:frame draw:style-name="fr1" draw:name="Imagen38" text:anchor-type="char" svg:width="17cm" svg:height="9.107cm" draw:z-index="38"><draw:image xlink:href="Pictures/100000010000077F000004041FBFD73F.png" xlink:type="simple" xlink:show="embed" xlink:actuate="onLoad" draw:mime-type="image/png"/></draw:frame><draw:frame draw:style-name="fr1" draw:name="Imagen39" text:anchor-type="char" svg:width="17cm" svg:height="9.107cm" draw:z-index="39"><draw:image xlink:href="Pictures/100000010000077F000004046DA041A4.png" xlink:type="simple" xlink:show="embed" xlink:actuate="onLoad" draw:mime-type="image/png"/></draw:frame><text:soft-page-break/><text:span text:style-name="Strong_20_Emphasis"><text:span text:style-name="T25"/></text:span></text:p>
      <text:h text:style-name="P26" text:outline-level="2"><text:span text:style-name="Strong_20_Emphasis"><text:span text:style-name="T1"/></text:span></text:h>
      <text:h text:style-name="P26" text:outline-level="2"><text:span text:style-name="Strong_20_Emphasis"><text:span text:style-name="T2">1. Inserir o pendrive no PC (no anfitrión Windows)</text:span></text:span></text:h>
      <text:list text:style-name="L12">
        <text:list-item>
          <text:p text:style-name="P31">Conéctalo normalmente ao PC.</text:p>
        </text:list-item>
      </text:list>
      <text:h text:style-name="P32" text:outline-level="2"><text:span text:style-name="Strong_20_Emphasis">2. Activar o pendrive dentro da máquina virtual</text:span></text:h>
      <text:p text:style-name="P33">Na barra superior de VirtualBox:</text:p>
      <text:p text:style-name="P33"><text:span text:style-name="Strong_20_Emphasis">Devices → USB → selecciona o pendrive</text:span></text:p>
      <text:p text:style-name="P33">👉 Se non o marcas, <text:span text:style-name="Strong_20_Emphasis">Linux non o verá</text:span>.</text:p>
      <text:h text:style-name="P32" text:outline-level="2"><text:span text:style-name="Strong_20_Emphasis">3. Comprobar que Linux detecta o pendrive</text:span></text:h>
      <text:p text:style-name="P33">Dentro da VM, executa:</text:p>
      <text:p text:style-name="P34">Código</text:p>
      <text:p text:style-name="P35"><text:span text:style-name="Source_20_Text">lsblk</text:span></text:p>
      <text:p text:style-name="P33">Verás algo así:</text:p>
      <text:p text:style-name="P34">Código</text:p>
      <text:p text:style-name="P35"><text:span text:style-name="Source_20_Text">sdb <text:s text:c="5"/>8:16 <text:s text:c="2"/>1 <text:s/>14.6G <text:s/>0 disk</text:span></text:p>
      <text:p text:style-name="P36"><text:span text:style-name="Source_20_Text">└─sdb1 <text:s text:c="2"/>8:17 <text:s text:c="2"/>1 <text:s/>14.6G <text:s/>0 part</text:span></text:p>
      <text:p text:style-name="P33">Se aparece <text:span text:style-name="Strong_20_Emphasis">sdb1</text:span>, imos ben.</text:p>
      <text:h text:style-name="P32" text:outline-level="2"><text:span text:style-name="Strong_20_Emphasis">4. Crear un punto de montaxe</text:span></text:h>
      <text:p text:style-name="P34">Código</text:p>
      <text:p text:style-name="P35"><text:soft-page-break/><text:span text:style-name="Source_20_Text">sudo mkdir /mnt/usb</text:span></text:p>
      <text:h text:style-name="P32" text:outline-level="2"><text:span text:style-name="Strong_20_Emphasis">5. Montar o pendrive</text:span></text:h>
      <text:p text:style-name="P34">Código</text:p>
      <text:p text:style-name="P35"><text:span text:style-name="Source_20_Text">sudo mount /dev/sdb1 /mnt/usb</text:span></text:p>
      <text:p text:style-name="P33">⚠️ Se o teu pendrive aparece como outra letra (ex: sdc1), cambia o comando.</text:p>
      <text:h text:style-name="P32" text:outline-level="2"><text:span text:style-name="Strong_20_Emphasis">6. Copiar o ficheiro </text:span><text:span text:style-name="Source_20_Text">client.conf</text:span><text:span text:style-name="Strong_20_Emphasis"> ao pendrive</text:span></text:h>
      <text:p text:style-name="P33">Agora si funciona:</text:p>
      <text:p text:style-name="P34">Código</text:p>
      <text:p text:style-name="P35"><text:span text:style-name="Source_20_Text">sudo cp client.conf /mnt/usb/</text:span></text:p>
      <text:h text:style-name="P32" text:outline-level="2"><text:span text:style-name="Strong_20_Emphasis">7. Desmontar o pendrive</text:span></text:h>
      <text:p text:style-name="P34">Código</text:p>
      <text:p text:style-name="P35"><text:span text:style-name="Source_20_Text">sudo umount /mnt/usb</text:span></text:p>
      <text:h text:style-name="P32" text:outline-level="2"><text:span text:style-name="Strong_20_Emphasis">8. Sacar o pendrive da VM</text:span></text:h>
      <text:p text:style-name="P33">VirtualBox → <text:span text:style-name="Strong_20_Emphasis">Devices → USB → desmarcar o pendrive</text:span></text:p>
      <text:p text:style-name="P33">Agora xa aparece en Windows e podes abrilo.</text:p>
      <text:p text:style-name="P1"><draw:frame draw:style-name="fr1" draw:name="Imagen40" text:anchor-type="char" svg:width="17cm" svg:height="9.155cm" draw:z-index="40"><draw:image xlink:href="Pictures/100000010000077F00000409E20EB1D1.png" xlink:type="simple" xlink:show="embed" xlink:actuate="onLoad" draw:mime-type="image/png"/></draw:frame><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Xerar claves NOVAS para o cliente </text:span></text:span></text:p>
      <text:p text:style-name="P1"><draw:frame draw:style-name="fr2" draw:name="Imagen42" text:anchor-type="char" svg:width="17cm" svg:height="9.155cm" draw:z-index="42"><draw:image xlink:href="Pictures/100000010000077F0000040943E61270.png" xlink:type="simple" xlink:show="embed" xlink:actuate="onLoad" draw:mime-type="image/png"/></draw:frame><text:span text:style-name="Strong_20_Emphasis"><text:span text:style-name="T1"/></text:span></text:p>
      <text:p text:style-name="P1"><draw:frame draw:style-name="fr3" draw:name="Imagen43" text:anchor-type="char" svg:x="0cm" svg:y="0.513cm" svg:width="17cm" svg:height="9.144cm" draw:z-index="43"><draw:image xlink:href="Pictures/100000010000077F000004085CEFE0B3.png" xlink:type="simple" xlink:show="embed" xlink:actuate="onLoad" draw:mime-type="image/png"/></draw:frame><text:span text:style-name="Strong_20_Emphasis"><text:span text:style-name="T1">Crear un </text:span></text:span><text:span text:style-name="Source_20_Text"><text:span text:style-name="T26">client.conf</text:span></text:span><text:span text:style-name="Strong_20_Emphasis"><text:span text:style-name="T1"> </text:span></text:span></text:p>
      <text:p text:style-name="P1"><text:span text:style-name="Strong_20_Emphasis"><text:span text:style-name="T1"/></text:span></text:p>
      <text:p text:style-name="P1"><text:span text:style-name="Strong_20_Emphasis"><text:span text:style-name="T1">Copiar o ficheiro </text:span></text:span><text:span text:style-name="Source_20_Text"><text:span text:style-name="T26">client.conf</text:span></text:span><text:span text:style-name="Strong_20_Emphasis"><text:span text:style-name="T1"> desde o servidor (ou pendrive)</text:span></text:span></text:p>
      <text:p text:style-name="P1"><text:span text:style-name="Strong_20_Emphasis"><text:span text:style-name="T1">Importar o túnel en WireGuard</text:span></text:span></text:p>
      <text:p text:style-name="P1"><text:span text:style-name="Strong_20_Emphasis"><text:span text:style-name="T1"/></text:span></text:p>
      <text:p text:style-name="P1"><draw:frame draw:style-name="fr1" draw:name="Imagen41" text:anchor-type="char" svg:width="17cm" svg:height="9.144cm" draw:z-index="41"><draw:image xlink:href="Pictures/100000010000077F0000040891C7D3D9.png" xlink:type="simple" xlink:show="embed" xlink:actuate="onLoad" draw:mime-type="image/png"/></draw:frame><text:soft-page-break/><text:span text:style-name="Strong_20_Emphasis"><text:span text:style-name="T5"/></text:span></text:p>
      <text:p text:style-name="P1"><text:span text:style-name="Strong_20_Emphasis"><text:span text:style-name="T5">Activar túnel</text:span></text:span></text:p>
      <text:p text:style-name="P1"><text:span text:style-name="Strong_20_Emphasis"><text:span text:style-name="T5">---------------------------------------------------------</text:span></text:span></text:p>
      <text:p text:style-name="P1"><text:span text:style-name="Strong_20_Emphasis"><text:span text:style-name="T5">| <text:s text:c="15"/>WIREGUARD – TÚNEL ACTIVADO <text:s text:c="12"/>|</text:span></text:span></text:p>
      <text:p text:style-name="P1"><text:span text:style-name="Strong_20_Emphasis"><text:span text:style-name="T5">---------------------------------------------------------</text:span></text:span></text:p>
      <text:p text:style-name="P1"><text:span text:style-name="Strong_20_Emphasis"><text:span text:style-name="T5">| Tunnel: client.conf (Active) <text:s text:c="26"/>|</text:span></text:span></text:p>
      <text:p text:style-name="P1"><text:span text:style-name="Strong_20_Emphasis"><text:span text:style-name="T5">| Latest Handshake: 3 seconds ago <text:s text:c="23"/>|</text:span></text:span></text:p>
      <text:p text:style-name="P1"><text:span text:style-name="Strong_20_Emphasis"><text:span text:style-name="T5">| Transfer: 2.12 KiB received, 1.01 KiB sent <text:s text:c="12"/>|</text:span></text:span></text:p>
      <text:p text:style-name="P1"><text:span text:style-name="Strong_20_Emphasis"><text:span text:style-name="T5">| [Deactivate] <text:s text:c="2"/>[Edit] <text:s text:c="2"/>[Remove] <text:s text:c="22"/>|</text:span></text:span></text:p>
      <text:p text:style-name="P1"><text:span text:style-name="Strong_20_Emphasis"><text:span text:style-name="T5">---------------------------------------------------------</text:span></text:span></text:p>
      <text:p text:style-name="P1"><text:span text:style-name="Strong_20_Emphasis"><text:span text:style-name="T1">Probas</text:span></text:span></text:p>
      <text:p text:style-name="P1"><text:span text:style-name="Strong_20_Emphasis"><text:span text:style-name="T1">---------------------------------------------------------</text:span></text:span></text:p>
      <text:p text:style-name="P1"><text:span text:style-name="Strong_20_Emphasis"><text:span text:style-name="T1">| <text:s text:c="20"/>PROBA DE PING <text:s text:c="20"/>|</text:span></text:span></text:p>
      <text:p text:style-name="P1"><text:span text:style-name="Strong_20_Emphasis"><text:span text:style-name="T1">---------------------------------------------------------</text:span></text:span></text:p>
      <text:p text:style-name="P1"><text:span text:style-name="Strong_20_Emphasis"><text:span text:style-name="T1">| Cliente → Servidor VPN <text:s text:c="32"/>|</text:span></text:span></text:p>
      <text:p text:style-name="P1"><text:span text:style-name="Strong_20_Emphasis"><text:span text:style-name="T1">| <text:s text:c="2"/>ping 10.0.0.1 <text:s text:c="39"/>|</text:span></text:span></text:p>
      <text:p text:style-name="P1"><text:span text:style-name="Strong_20_Emphasis"><text:span text:style-name="T1">| Cliente → Servidor Apache <text:s text:c="29"/>|</text:span></text:span></text:p>
      <text:p text:style-name="P1"><text:span text:style-name="Strong_20_Emphasis"><text:span text:style-name="T1">| <text:s text:c="2"/>ping 192.168.1.10 <text:s text:c="35"/>|</text:span></text:span></text:p>
      <text:p text:style-name="P1"><text:span text:style-name="Strong_20_Emphasis"><text:span text:style-name="T1">| Resposta esperada: <text:s text:c="36"/>|</text:span></text:span></text:p>
      <text:p text:style-name="P1"><text:span text:style-name="Strong_20_Emphasis"><text:span text:style-name="T1">| <text:s text:c="2"/>64 bytes from 192.168.1.10: icmp_seq=1 ttl=64 time=1ms|</text:span></text:span></text:p>
      <text:p text:style-name="P1"><text:soft-page-break/><text:span text:style-name="Strong_20_Emphasis"><text:span text:style-name="T1">---------------------------------------------------------</text:span></text:span></text:p>
      <text:p text:style-name="P1"><text:span text:style-name="Strong_20_Emphasis"><text:span text:style-name="T1">| <text:s text:c="16"/>PROBA DE ACCESO A APACHE <text:s text:c="13"/>|</text:span></text:span></text:p>
      <text:p text:style-name="P1"><text:span text:style-name="Strong_20_Emphasis"><text:span text:style-name="T1">---------------------------------------------------------</text:span></text:span></text:p>
      <text:p text:style-name="P1"><text:span text:style-name="Strong_20_Emphasis"><text:span text:style-name="T1">| Cliente conectado á VPN: <text:s text:c="30"/>|</text:span></text:span></text:p>
      <text:p text:style-name="P1"><text:span text:style-name="Strong_20_Emphasis"><text:span text:style-name="T1">| <text:s text:c="2"/>IP VPN: 10.0.0.3 <text:s text:c="36"/>|</text:span></text:span></text:p>
      <text:p text:style-name="P1"><text:span text:style-name="Strong_20_Emphasis"><text:span text:style-name="T1">| Navegador: <text:s text:c="44"/>|</text:span></text:span></text:p>
      <text:p text:style-name="P1"><text:span text:style-name="Strong_20_Emphasis"><text:span text:style-name="T1">| <text:s text:c="2"/>http://192.168.1.10 <text:s text:c="33"/>|</text:span></text:span></text:p>
      <text:p text:style-name="P1"><text:span text:style-name="Strong_20_Emphasis"><text:span text:style-name="T1">| Resultado esperado: <text:s text:c="35"/>|</text:span></text:span></text:p>
      <text:p text:style-name="P1"><text:span text:style-name="Strong_20_Emphasis"><text:span text:style-name="T1">| <text:s text:c="2"/>“It works!” <text:s text:c="41"/>|</text:span></text:span></text:p>
      <text:p text:style-name="P1"><text:span text:style-name="Strong_20_Emphasis"><text:span text:style-name="T1">---------------------------------------------------------</text:span></text:span></text:p>
      <text:h text:style-name="P2" text:outline-level="1"><text:span text:style-name="Strong_20_Emphasis"><text:span text:style-name="T2">8. Conclusións e reflexións</text:span></text:span></text:h>
      <text:p text:style-name="P4">O proxecto permitiu aprender:</text:p>
      <text:list text:style-name="L13">
        <text:list-item>
          <text:p text:style-name="P37">Configuración avanzada de redes en Linux.</text:p>
        </text:list-item>
        <text:list-item>
          <text:p text:style-name="P37">Uso de NAT, reenvío de paquetes e firewall.</text:p>
        </text:list-item>
        <text:list-item>
          <text:p text:style-name="P37">Implantación dunha VPN moderna e segura.</text:p>
        </text:list-item>
        <text:list-item>
          <text:p text:style-name="P37">Resolución de erros reais (claves, interfaces, NAT).</text:p>
        </text:list-item>
        <text:list-item>
          <text:p text:style-name="P37">Importancia da documentación técnica.</text:p>
        </text:list-item>
      </text:list>
      <text:p text:style-name="P4">A solución cumpre todos os requisitos e permite acceso seguro á rede interna.</text:p>
      <text:h text:style-name="P2" text:outline-level="1"><text:span text:style-name="Strong_20_Emphasis"><text:span text:style-name="T2">9. Bibliografía e Webgrafía (APA)</text:span></text:span></text:h>
      <text:p text:style-name="P1"><text:span text:style-name="Strong_20_Emphasis"><text:span text:style-name="T1">---------------------------------------------------------</text:span></text:span></text:p>
      <text:p text:style-name="P1"><text:span text:style-name="Strong_20_Emphasis"><text:span text:style-name="T1">| <text:s text:c="19"/>BIBLIOGRAFÍA APA <text:s text:c="18"/>|</text:span></text:span></text:p>
      <text:p text:style-name="P1"><text:span text:style-name="Strong_20_Emphasis"><text:span text:style-name="T1">---------------------------------------------------------</text:span></text:span></text:p>
      <text:p text:style-name="P1"><text:span text:style-name="Strong_20_Emphasis"><text:span text:style-name="T1">| WireGuard. (2024). WireGuard Documentation. <text:s text:c="11"/>|</text:span></text:span></text:p>
      <text:p text:style-name="P1"><text:span text:style-name="Strong_20_Emphasis"><text:span text:style-name="T1">| https://www.wireguard.com/ <text:s text:c="28"/>|</text:span></text:span></text:p>
      <text:p text:style-name="P1"><text:span text:style-name="Strong_20_Emphasis"><text:span text:style-name="T1">| Ubuntu. (2024). Ubuntu Server Guide. <text:s text:c="18"/>|</text:span></text:span></text:p>
      <text:p text:style-name="P1"><text:span text:style-name="Strong_20_Emphasis"><text:span text:style-name="T1">| https://ubuntu.com/server/docs <text:s text:c="24"/>|</text:span></text:span></text:p>
      <text:p text:style-name="P1"><text:span text:style-name="Strong_20_Emphasis"><text:span text:style-name="T1">| VirtualBox. (2024). User Manual. <text:s text:c="22"/>|</text:span></text:span></text:p>
      <text:p text:style-name="P1"><text:span text:style-name="Strong_20_Emphasis"><text:span text:style-name="T1">| https://www.virtualbox.org/manual <text:s text:c="21"/>|</text:span></text:span></text:p>
      <text:p text:style-name="P1"><text:span text:style-name="Strong_20_Emphasis"><text:span text:style-name="T1">---------------------------------------------------------</text:span></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1T17:37:56.038780200</meta:creation-date>
    <dc:date>2026-06-01T17:43:59.870479300</dc:date>
    <meta:editing-duration>PT6M4S</meta:editing-duration>
    <meta:editing-cycles>1</meta:editing-cycles>
    <meta:document-statistic meta:table-count="0" meta:image-count="44" meta:object-count="0" meta:page-count="30" meta:paragraph-count="248" meta:word-count="1728" meta:character-count="12927" meta:non-whitespace-character-count="9468"/>
    <meta:generator>LibreOffice/25.8.6.2$Windows_X86_64 LibreOffice_project/b4b39682cd9868fa725bc664aff94278d315bd04</meta:generator>
  </office:meta>
</office:document-meta>
</file>